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B00000200B0A0EF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2.675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3.175cm" svg:height="1.27cm" svg:x="2.54cm" svg:y="12.7cm">
          <text:p text:style-name="P1">DV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175cm" svg:height="1.27cm" svg:x="10.16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27cm" svg:x="6.35cm" svg:y="12.7cm">
          <text:p text:style-name="P1">HDMI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175cm" svg:height="3.175cm" svg:x="11.43cm" svg:y="5.715cm">
          <text:p text:style-name="P1">BenQ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75cm" svg:height="3.175cm" svg:x="1.27cm" svg:y="5.715cm">
          <text:p text:style-name="P1">L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75cm" svg:height="3.175cm" svg:x="6.35cm" svg:y="5.715cm">
          <text:p text:style-name="P1">H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747cm" svg:y1="12.7cm" svg:x2="2.857cm" svg:y2="8.89cm" draw:start-shape="id1" draw:start-glue-point="0" draw:end-shape="id2" draw:end-glue-point="2" svg:d="M11747 12700v-1905h-8890v-1905" svg:viewBox="0 0 8891 3811">
          <text:p/>
        </draw:connector>
        <draw:connector draw:style-name="gr3" draw:text-style-name="P1" draw:layer="layout" svg:x1="7.937cm" svg:y1="12.7cm" svg:x2="7.937cm" svg:y2="8.89cm" draw:start-shape="id3" draw:start-glue-point="0" draw:end-shape="id4" draw:end-glue-point="2" svg:d="M7937 12700v-3810" svg:viewBox="0 0 1 3811">
          <text:p/>
        </draw:connector>
        <draw:connector draw:style-name="gr3" draw:text-style-name="P1" draw:layer="layout" draw:line-skew="-0.635cm" svg:x1="4.127cm" svg:y1="12.7cm" svg:x2="13.017cm" svg:y2="8.89cm" draw:start-shape="id5" draw:start-glue-point="0" draw:end-shape="id6" draw:end-glue-point="2" svg:d="M4127 12700v-2540h8890v-1270" svg:viewBox="0 0 8891 3811">
          <text:p/>
        </draw:connector>
        <draw:frame draw:style-name="gr4" draw:text-style-name="P1" draw:layer="layout" svg:width="9.447cm" svg:height="8.471cm" draw:transform="skewX (0.00191986217719376) rotate (0.000872664625997165) translate (17.789cm 5.723cm)">
          <draw:image xlink:href="Pictures/100000010000023B00000200B0A0EF81.png" xlink:type="simple" xlink:show="embed" xlink:actuate="onLoad" draw:mime-type="image/png">
            <text:p/>
          </draw:image>
        </draw:frame>
        <draw:frame draw:style-name="gr5" draw:text-style-name="P2" draw:layer="layout" svg:width="13.335cm" svg:height="0.962cm" svg:x="1.27cm" svg:y="4.445cm">
          <draw:text-box>
            <text:p>View looking directly at the video card ports</text:p>
          </draw:text-box>
        </draw:frame>
        <draw:frame draw:style-name="gr6" draw:text-style-name="P2" draw:layer="layout" svg:width="13.335cm" svg:height="2.54cm" svg:x="1.27cm" svg:y="1.27cm">
          <draw:text-box>
            <text:p>Display / Video Card configuration</text:p>
            <text:p><text:span text:style-name="T1">bethe, 14May2026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0:28:12.165712189</meta:creation-date>
    <dc:date>2026-05-14T10:35:36.243078297</dc:date>
    <meta:editing-duration>PT7M25S</meta:editing-duration>
    <meta:editing-cycles>1</meta:editing-cycles>
    <meta:document-statistic meta:object-count="35"/>
    <meta:generator>LibreOffice/26.2.3.2$Linux_X86_64 LibreOffice_project/d4d5ed47b6084125f28d269a5650105d54dde034</meta:generator>
  </office:meta>
</office:document-meta>
</file>